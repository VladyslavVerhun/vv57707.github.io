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4E00000207E868EA5E.png" manifest:media-type="image/png"/>
  <manifest:file-entry manifest:full-path="Pictures/1000000100000619000004F9CAC5C726.png" manifest:media-type="image/png"/>
  <manifest:file-entry manifest:full-path="Pictures/10000001000002770000020BD037D7F2.png" manifest:media-type="image/png"/>
  <manifest:file-entry manifest:full-path="Pictures/100000010000027000000214B1380C48.png" manifest:media-type="image/png"/>
  <manifest:file-entry manifest:full-path="Pictures/100000010000025B000002147F93EEAB.png" manifest:media-type="image/png"/>
  <manifest:file-entry manifest:full-path="Pictures/1000000100000250000002051944D10E.png" manifest:media-type="image/png"/>
  <manifest:file-entry manifest:full-path="Pictures/1000000100000212000001276E0E7B06.png" manifest:media-type="image/png"/>
  <manifest:file-entry manifest:full-path="Pictures/10000001000004D8000002138BB6B113.png" manifest:media-type="image/png"/>
  <manifest:file-entry manifest:full-path="Pictures/10000001000005340000021064CF44B8.png" manifest:media-type="image/png"/>
  <manifest:file-entry manifest:full-path="Pictures/10000001000005060000020378BCDDF0.png" manifest:media-type="image/png"/>
  <manifest:file-entry manifest:full-path="Pictures/1000000100000465000001027047DF29.png" manifest:media-type="image/png"/>
  <manifest:file-entry manifest:full-path="Pictures/1000000100000D65000005662CEBA17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443cm" fo:margin-left="0.009cm" fo:margin-top="0cm" fo:margin-bottom="0cm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7.504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61cm" style:rel-width="100%" fo:margin-left="0.009cm" fo:margin-top="0cm" fo:margin-bottom="0cm" table:align="left" style:writing-mode="lr-tb"/>
    </style:style>
    <style:style style:name="Tabela2.A" style:family="table-column">
      <style:table-column-properties style:column-width="14.457cm" style:rel-column-width="51320*"/>
    </style:style>
    <style:style style:name="Tabela2.B" style:family="table-column">
      <style:table-column-properties style:column-width="2.002cm" style:rel-column-width="7104*"/>
    </style:style>
    <style:style style:name="Tabela2.C" style:family="table-column">
      <style:table-column-properties style:column-width="2.004cm" style:rel-column-width="7111*"/>
    </style:style>
    <style:style style:name="Tabela2.1" style:family="table-row">
      <style:table-row-properties style:row-height="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7cm" style:rel-column-width="51320*"/>
    </style:style>
    <style:style style:name="Tabela3.B" style:family="table-column">
      <style:table-column-properties style:column-width="2.002cm" style:rel-column-width="7104*"/>
    </style:style>
    <style:style style:name="Tabela3.C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7cm" style:rel-column-width="51320*"/>
    </style:style>
    <style:style style:name="Tabela4.B" style:family="table-column">
      <style:table-column-properties style:column-width="2.002cm" style:rel-column-width="7104*"/>
    </style:style>
    <style:style style:name="Tabela4.C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7cm" style:rel-column-width="51320*"/>
    </style:style>
    <style:style style:name="Tabela5.B" style:family="table-column">
      <style:table-column-properties style:column-width="2.002cm" style:rel-column-width="7104*"/>
    </style:style>
    <style:style style:name="Tabela5.C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461cm" style:rel-width="100%" fo:margin-left="0.009cm" fo:margin-top="0cm" fo:margin-bottom="0cm" table:align="left" style:writing-mode="lr-tb"/>
    </style:style>
    <style:style style:name="Tabela6.A" style:family="table-column">
      <style:table-column-properties style:column-width="14.457cm" style:rel-column-width="51320*"/>
    </style:style>
    <style:style style:name="Tabela6.B" style:family="table-column">
      <style:table-column-properties style:column-width="2.002cm" style:rel-column-width="7104*"/>
    </style:style>
    <style:style style:name="Tabela6.C" style:family="table-column">
      <style:table-column-properties style:column-width="2.004cm" style:rel-column-width="7111*"/>
    </style:style>
    <style:style style:name="Tabela6.1" style:family="table-row">
      <style:table-row-properties style: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461cm" style:rel-width="100%" fo:margin-left="0.009cm" fo:margin-top="0cm" fo:margin-bottom="0cm" table:align="left" style:writing-mode="lr-tb"/>
    </style:style>
    <style:style style:name="Tabela7.A" style:family="table-column">
      <style:table-column-properties style:column-width="14.457cm" style:rel-column-width="51320*"/>
    </style:style>
    <style:style style:name="Tabela7.B" style:family="table-column">
      <style:table-column-properties style:column-width="2.002cm" style:rel-column-width="7104*"/>
    </style:style>
    <style:style style:name="Tabela7.C" style:family="table-column">
      <style:table-column-properties style:column-width="2.004cm" style:rel-column-width="7111*"/>
    </style:style>
    <style:style style:name="Tabela7.1" style:family="table-row">
      <style:table-row-properties style:row-height="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461cm" style:rel-width="100%" fo:margin-left="0.009cm" fo:margin-top="0cm" fo:margin-bottom="0cm" table:align="left" style:writing-mode="lr-tb"/>
    </style:style>
    <style:style style:name="Tabela8.A" style:family="table-column">
      <style:table-column-properties style:column-width="14.457cm" style:rel-column-width="51320*"/>
    </style:style>
    <style:style style:name="Tabela8.B" style:family="table-column">
      <style:table-column-properties style:column-width="2.002cm" style:rel-column-width="7104*"/>
    </style:style>
    <style:style style:name="Tabela8.C" style:family="table-column">
      <style:table-column-properties style:column-width="2.004cm" style:rel-column-width="7111*"/>
    </style:style>
    <style:style style:name="Tabela8.1" style:family="table-row">
      <style:table-row-properties style:row-height="1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8.461cm" style:rel-width="100%" fo:margin-left="0.009cm" fo:margin-top="0cm" fo:margin-bottom="0cm" table:align="left" style:writing-mode="lr-tb"/>
    </style:style>
    <style:style style:name="Tabela9.A" style:family="table-column">
      <style:table-column-properties style:column-width="14.457cm" style:rel-column-width="51320*"/>
    </style:style>
    <style:style style:name="Tabela9.B" style:family="table-column">
      <style:table-column-properties style:column-width="2.002cm" style:rel-column-width="7104*"/>
    </style:style>
    <style:style style:name="Tabela9.C" style:family="table-column">
      <style:table-column-properties style:column-width="2.004cm" style:rel-column-width="7111*"/>
    </style:style>
    <style:style style:name="Tabela9.1" style:family="table-row">
      <style:table-row-properties style:row-height="1cm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5" style:family="paragraph" style:parent-style-name="List_20_Paragraph" style:list-style-name="WWNum6"/>
    <style:style style:name="P6" style:family="paragraph" style:parent-style-name="Heading_20_1">
      <style:paragraph-properties>
        <style:tab-stops>
          <style:tab-stop style:position="4.805cm"/>
        </style:tab-stops>
      </style:paragraph-properties>
    </style:style>
    <style:style style:name="P7" style:family="paragraph" style:parent-style-name="Heading_20_1">
      <style:paragraph-properties>
        <style:tab-stops>
          <style:tab-stop style:position="4.995cm"/>
          <style:tab-stop style:position="5.911cm"/>
        </style:tab-stops>
      </style:paragraph-properties>
    </style:style>
    <style:style style:name="P8" style:family="paragraph" style:parent-style-name="List_20_Paragraph" style:list-style-name="WWNum10"/>
    <style:style style:name="P9" style:family="paragraph" style:parent-style-name="Zadanie">
      <style:paragraph-properties fo:text-align="center" style:justify-single-word="false"/>
    </style:style>
    <style:style style:name="P10" style:family="paragraph" style:parent-style-name="PunktyTabela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1" style:family="paragraph" style:parent-style-name="PunktyTabela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text-properties fo:language="pl" fo:country="PL"/>
    </style:style>
    <style:style style:name="P13" style:family="paragraph" style:parent-style-name="Zadanie">
      <style:text-properties officeooo:paragraph-rsid="0021eb13"/>
    </style:style>
    <style:style style:name="T1" style:family="text">
      <style:text-properties fo:language="pl" fo:country="PL" fo:font-weight="bold" style:font-weight-asian="bold" style:font-weight-complex="bold"/>
    </style:style>
    <style:style style:name="T2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language="pl" fo:country="PL"/>
    </style:style>
    <style:style style:name="T5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6" style:family="text">
      <style:text-properties fo:font-size="12pt" fo:language="pl" fo:country="PL" style:font-name-asian="F" style:font-size-asian="12pt" style:language-asian="pl" style:country-asian="PL" style:font-size-complex="12pt"/>
    </style:style>
    <style:style style:name="T7" style:family="text">
      <style:text-properties text:display="true"/>
    </style:style>
    <style:style style:name="T8" style:family="text">
      <style:text-properties fo:font-size="12pt" fo:language="pl" fo:country="PL" style:font-name-asian="F" style:font-size-asian="12pt" style:language-asian="pl" style:country-asian="PL" style:font-size-complex="12pt" text:display="true"/>
    </style:style>
    <style:style style:name="T9" style:family="text">
      <style:text-properties fo:language="pl" fo:country="PL" style:text-underline-style="solid" style:text-underline-width="auto" style:text-underline-color="font-color"/>
    </style:style>
    <style:style style:name="T10" style:family="text">
      <style:text-properties fo:font-family="'Segoe UI Emoji'" style:font-family-generic="swiss" style:font-pitch="variable" fo:language="pl" fo:country="PL" style:font-family-asian="'Segoe UI Emoji'" style:font-family-generic-asian="system" style:font-pitch-asian="variable" style:font-family-complex="'Segoe UI Emoji'" style:font-family-generic-complex="system" style:font-pitch-complex="variable"/>
    </style:style>
    <style:style style:name="T11" style:family="text">
      <style:text-properties officeooo:rsid="002253e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1" loext:marker-style-name="T1"><text:span text:style-name="T2"><text:user-defined style:data-style-name="N0" text:name="Kod kursu">PTW</text:user-defined></text:span></text:p>
          </table:table-cell>
          <table:table-cell table:style-name="Tabela1.B1" table:number-rows-spanned="3" office:value-type="string">
            <text:p text:style-name="P1" loext:marker-style-name="T3"><text:span text:style-name="T3"><text:user-defined style:data-style-name="N0" text:name="Nazwisko">Verhun</text:user-defined></text:span><text:span text:style-name="T3"><text:s/></text:span><text:span text:style-name="T3"><text:user-defined style:data-style-name="N0" text:name="Imie">Vladyslav</text:user-defined></text:span></text:p>
            <text:p text:style-name="P1" loext:marker-style-name="T4"><text:span text:style-name="T4">Album </text:span><text:span text:style-name="T4"><text:user-defined style:data-style-name="N0" text:name="Numer albumu">57707</text:user-defined></text:span></text:p>
            <text:p text:style-name="P1" loext:marker-style-name="T4"><text:span text:style-name="T4">Grupa </text:span><text:span text:style-name="T4"><text:user-defined style:data-style-name="N0" text:name="Grupa">251B</text:user-defined></text:span></text:p>
          </table:table-cell>
          <table:table-cell table:style-name="Tabela1.C1" office:value-type="string">
            <text:p text:style-name="P2" loext:marker-style-name="T1"><text:span text:style-name="T1">Wersja </text:span><text:span text:style-name="T1"><text:user-defined style:data-style-name="N49" text:name="Wersja">2026-03-02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3" loext:marker-style-name="T4"/>
          </table:table-cell>
        </table:table-row>
        <table:table-row table:style-name="Tabela1.3">
          <table:table-cell table:style-name="Tabela1.A3" office:value-type="string">
            <text:p text:style-name="P1" loext:marker-style-name="T1"><text:span text:style-name="T5"><text:user-defined style:data-style-name="N0" text:name="Kod laboratorium">LAB C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 loext:marker-style-name="T4"><text:span text:style-name="T4">Zaawansowane JS w przeglądarce - puzzle</text:span><text:span text:style-name="T4"/></text:p>
      <text:h text:style-name="Heading_20_1" text:outline-level="1" loext:marker-style-name="T4"><text:bookmark-start text:name="_Toc223385944"/><text:span text:style-name="T4">Spis treści</text:span><text:bookmark-end text:name="_Toc223385944"/><text:span text:style-name="T4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 loext:marker-style-name="T6"><text:a xlink:type="simple" xlink:href="#_Toc223385944" text:style-name="Index_20_Link" text:visited-style-name="Index_20_Link"><text:span text:style-name="T4">Spis treści</text:span><text:span text:style-name="T7"><text:tab/>1</text:span></text:a></text:p>
          <text:p text:style-name="P4" loext:marker-style-name="T6"><text:a xlink:type="simple" xlink:href="#_Toc223385945" text:style-name="Index_20_Link" text:visited-style-name="Index_20_Link"><text:span text:style-name="T4">Cel zajęć</text:span><text:span text:style-name="T7"><text:tab/>1</text:span></text:a></text:p>
          <text:p text:style-name="P4" loext:marker-style-name="T6"><text:a xlink:type="simple" xlink:href="#_Toc223385946" text:style-name="Index_20_Link" text:visited-style-name="Index_20_Link"><text:span text:style-name="T4">Rozpoczęcie</text:span><text:span text:style-name="T7"><text:tab/>1</text:span></text:a></text:p>
          <text:p text:style-name="P4" loext:marker-style-name="T6"><text:a xlink:type="simple" xlink:href="#_Toc223385947" text:style-name="Index_20_Link" text:visited-style-name="Index_20_Link"><text:span text:style-name="T4">Uwaga</text:span><text:span text:style-name="T7"><text:tab/>1</text:span></text:a></text:p>
          <text:p text:style-name="P4" loext:marker-style-name="T6"><text:a xlink:type="simple" xlink:href="#_Toc223385948" text:style-name="Index_20_Link" text:visited-style-name="Index_20_Link"><text:span text:style-name="T4">Wymagania</text:span><text:span text:style-name="T7"><text:tab/>2</text:span></text:a></text:p>
          <text:p text:style-name="P4" loext:marker-style-name="T6"><text:a xlink:type="simple" xlink:href="#_Toc223385949" text:style-name="Index_20_Link" text:visited-style-name="Index_20_Link"><text:span text:style-name="T4">Implementacja</text:span><text:span text:style-name="T7"><text:tab/>2</text:span></text:a></text:p>
          <text:p text:style-name="P4" loext:marker-style-name="T6"><text:a xlink:type="simple" xlink:href="#_Toc223385950" text:style-name="Index_20_Link" text:visited-style-name="Index_20_Link">Commit projektu do GIT<text:span text:style-name="T7"><text:tab/>5</text:span></text:a><text:span text:style-name="T8"/></text:p>
          <text:p text:style-name="P4" loext:marker-style-name="T6"><text:a xlink:type="simple" xlink:href="#_Toc223385951" text:style-name="Index_20_Link" text:visited-style-name="Index_20_Link"><text:span text:style-name="T4">Podsumowanie</text:span><text:span text:style-name="T7"><text:tab/>5</text:span></text:a></text:p>
        </text:index-body>
      </text:table-of-content>
      <text:h text:style-name="Heading_20_1" text:outline-level="1" loext:marker-style-name="T4"><text:bookmark-start text:name="_Toc223385945"/><text:span text:style-name="T4">Cel zajęć</text:span><text:bookmark-end text:name="_Toc223385945"/><text:span text:style-name="T4"/></text:h>
      <text:p text:style-name="Standard" loext:marker-style-name="T4"><text:bookmark-start text:name="_Hlk115208234"/><text:span text:style-name="T4">Celem głównym zajęć jest zdobycie następujących umiejętności:</text:span><text:span text:style-name="T4"/></text:p>
      <text:list text:style-name="WWNum6">
        <text:list-item>
          <text:p text:style-name="P5" loext:marker-style-name="T4"><text:bookmark-end text:name="_Hlk115208234"/><text:bookmark-start text:name="_Toc146283465"/><text:span text:style-name="T4">pobieranie lokalizacji w przeglądarce z wykorzystaniem Geolocation API</text:span><text:span text:style-name="T4"/></text:p>
        </text:list-item>
        <text:list-item>
          <text:p text:style-name="P5" loext:marker-style-name="T4"><text:span text:style-name="T4">wyświetlanie map z wykorzystaniem biblioteki Leaflet</text:span><text:span text:style-name="T4"/></text:p>
        </text:list-item>
        <text:list-item>
          <text:p text:style-name="P5" loext:marker-style-name="T4"><text:span text:style-name="T4">pobieranie map statycznych z wykorzystaniem Leaflet</text:span><text:span text:style-name="T4"/></text:p>
        </text:list-item>
        <text:list-item>
          <text:p text:style-name="P5" loext:marker-style-name="T4"><text:span text:style-name="T4">podział obrazów na sekcje z wykorzystaniem JS</text:span><text:span text:style-name="T4"/></text:p>
        </text:list-item>
        <text:list-item>
          <text:p text:style-name="P5" loext:marker-style-name="T4"><text:span text:style-name="T4">przestawianie elementów z wykorzystaniem Drag &amp; Drop</text:span><text:span text:style-name="T4"/></text:p>
        </text:list-item>
        <text:list-item>
          <text:p text:style-name="P5">wyświetlanie powiadomień</text:p>
        </text:list-item>
      </text:list>
      <text:p text:style-name="Standard" loext:marker-style-name="T4"><text:span text:style-name="T4">W praktycznym wymiarze uczestnicy stworzą dynamiczną aplikację – układankę – w której gracz będzie musiał ułożyć 16 elementów uprzednio wskazanej i pobranej mapy.</text:span><text:span text:style-name="T4"/></text:p>
      <text:h text:style-name="Heading_20_1" text:outline-level="1" loext:marker-style-name="T4"><text:bookmark-start text:name="_Toc223385946"/><text:span text:style-name="T4">Rozpoczęcie</text:span><text:bookmark-end text:name="_Toc223385946"/><text:bookmark-end text:name="_Toc146283465"/><text:span text:style-name="T4"/></text:h>
      <text:p text:style-name="Standard" loext:marker-style-name="T4"><text:span text:style-name="T4">Rozpoczęcie zajęć. Powtórzenie Geolocation API, Leaflet, Drag &amp; Drop, Canvas.</text:span><text:span text:style-name="T4"/></text:p>
      <text:p text:style-name="Standard" loext:marker-style-name="T4"><text:span text:style-name="T4">Wejściówka?</text:span><text:span text:style-name="T4"/></text:p>
      <text:h text:style-name="P6" text:outline-level="1" loext:marker-style-name="T4"><text:bookmark-start text:name="_Toc146283466"/><text:bookmark-start text:name="_Toc223385947"/><text:span text:style-name="T4">Uwaga</text:span><text:bookmark-end text:name="_Toc146283466"/><text:bookmark-end text:name="_Toc223385947"/><text:bookmark-start text:name="_Toc223385948"/><text:span text:style-name="T4"/></text:h>
      <text:p text:style-name="Standard" loext:marker-style-name="T4"><text:span text:style-name="T4">Ten dokument aktywnie wykorzystuje niestandardowe właściwości. Podobnie jak w poprzednio, wejdź do właściwości dokumentu i zaktualizuj niestandardowe pola.</text:span><text:span text:style-name="T4"/></text:p>
      <text:h text:style-name="P7" text:outline-level="1" loext:marker-style-name="T4"><text:soft-page-break/><text:span text:style-name="T4">Wymagania</text:span><text:bookmark-end text:name="_Toc223385948"/><text:span text:style-name="T4"><text:tab/><text:tab/></text:span><text:span text:style-name="T4"/></text:h>
      <text:p text:style-name="Standard" loext:marker-style-name="T4"><text:span text:style-name="T4">Szablon plików startowych do </text:span><text:span text:style-name="T4"><text:user-defined style:data-style-name="N0" text:name="Kod laboratorium">LAB C</text:user-defined></text:span><text:span text:style-name="T4"><text:s/>został dostarczony razem z instrukcją.</text:span></text:p>
      <text:p text:style-name="Standard" loext:marker-style-name="T4"><text:span text:style-name="T4">W ramach </text:span><text:span text:style-name="T4"><text:user-defined style:data-style-name="N0" text:name="Kod laboratorium">LAB C</text:user-defined></text:span><text:span text:style-name="T4"><text:s/>przygotowane powinny zostać:</text:span></text:p>
      <text:list text:style-name="WWNum10">
        <text:list-item>
          <text:p text:style-name="P8" loext:marker-style-name="T4"><text:span text:style-name="T4">pojedyncza strona HTML ze skryptem ładowanym z zewnętrznego pliku JS oraz stylami z zewnętrznego pliku CSS;</text:span><text:span text:style-name="T4"/></text:p>
        </text:list-item>
        <text:list-item>
          <text:p text:style-name="P8">pobranie zgody na lokalizację</text:p>
        </text:list-item>
        <text:list-item>
          <text:p text:style-name="P8">pobranie zgody na wyświetlanie powiadomień</text:p>
        </text:list-item>
        <text:list-item>
          <text:p text:style-name="P8" loext:marker-style-name="T4"><text:span text:style-name="T4">okno dynamicznej mapy (powiększanie/pomniejszanie, przesuwanie)</text:span><text:span text:style-name="T4"/></text:p>
        </text:list-item>
        <text:list-item>
          <text:p text:style-name="P8" loext:marker-style-name="T4"><text:span text:style-name="T4">przycisk „Moja lokalizacja” – wyświetla współrzędne oraz oznacza na mapie</text:span><text:span text:style-name="T4"/></text:p>
        </text:list-item>
        <text:list-item>
          <text:p text:style-name="P8" loext:marker-style-name="T4"><text:span text:style-name="T4">przycisk „Pobierz mapę” – eksportuje mapę w postaci rastrowej</text:span><text:span text:style-name="T4"/></text:p>
        </text:list-item>
        <text:list-item>
          <text:p text:style-name="P8" loext:marker-style-name="T4"><text:span text:style-name="T4">mapa rastrowa zostaje podzielona na 16 elementów i wymieszana; elementy rozrzucone na „stole”</text:span><text:span text:style-name="T4"/></text:p>
        </text:list-item>
        <text:list-item>
          <text:p text:style-name="P8" loext:marker-style-name="T4"><text:span text:style-name="T4">użycie mechanizmu drag &amp; drop do przemieszczania elementów na „stole”</text:span><text:span text:style-name="T4"/></text:p>
        </text:list-item>
        <text:list-item>
          <text:p text:style-name="P8" loext:marker-style-name="T4"><text:span text:style-name="T4">w tle weryfikacja czy element ustawiony na swoim miejscu</text:span><text:span text:style-name="T4"/></text:p>
        </text:list-item>
        <text:list-item>
          <text:p text:style-name="P8" loext:marker-style-name="T4"><text:span text:style-name="T4">w momencie ustawienia wszystkich elementów na swoim miejscu – wyświetlenie notyfikacji systemowej (</text:span><text:a xlink:type="simple" xlink:href="https://developer.mozilla.org/en-US/docs/Web/API/Notification" text:style-name="Internet_20_link" text:visited-style-name="Visited_20_Internet_20_Link"><text:span text:style-name="Internet_20_link"><text:span text:style-name="T4">https://developer.mozilla.org/en-US/docs/Web/API/Notification</text:span></text:span></text:a><text:span text:style-name="T4">)</text:span></text:p>
        </text:list-item>
      </text:list>
      <text:p text:style-name="Standard" loext:marker-style-name="T4"><text:span text:style-name="T4">Wideo z omówieniem działającej aplikacji: </text:span><text:a xlink:type="simple" xlink:href="https://www.youtube.com/watch?v=Peb_mgDTY0s" text:style-name="Internet_20_link" text:visited-style-name="Visited_20_Internet_20_Link"><text:span text:style-name="Internet_20_link"><text:span text:style-name="T4">https://www.youtube.com/watch?v=Peb_mgDTY0s</text:span></text:span></text:a><text:span text:style-name="T4">.</text:span></text:p>
      <text:p text:style-name="Standard" loext:marker-style-name="T4"><text:soft-page-break/><text:span text:style-name="T4">Prowadzący omówi powyższe wymagania. Upewnij się, czy wszystko rozumiesz. </text:span><text:span text:style-name="T4"/></text:p>
      <text:p text:style-name="Zadanie">Tu umieść swoje notatki:</text:p>
      <text:p text:style-name="Zadanie"/>
      <text:p text:style-name="Zadanie">…notatki…</text:p>
      <text:h text:style-name="Heading_20_1" text:outline-level="1" loext:marker-style-name="T4"><text:bookmark-start text:name="_Toc223385949"/><text:span text:style-name="T4">Implementacja</text:span><text:bookmark-end text:name="_Toc223385949"/><text:span text:style-name="T4"/></text:h>
      <text:p text:style-name="Standard" loext:marker-style-name="T4"><text:span text:style-name="T4">Tradycyjnie implementację należy zacząć od zbudowania w HTML + CSS wszystkich wymaganych elementów / placeholderów na te elementy. Następnie krok po kroku należy implementować poszczególne zachowania.</text:span><text:span text:style-name="T4"/></text:p>
      <text:p text:style-name="Standard" loext:marker-style-name="T4"><text:span text:style-name="T4">Dopiero po skończeniu implementacji całości zadania zrób i powklejaj zrzuty ekranu.</text:span><text:span text:style-name="T4"/></text:p>
      <text:p text:style-name="Standard" loext:marker-style-name="T4"><text:span text:style-name="T1">UWAGA!</text:span><text:span text:style-name="T4"> Większość kodu </text:span><text:span text:style-name="T9">jest już zrobiona</text:span><text:span text:style-name="T4">! Wystarczy przejrzeć kody źródłowe prezentowane na wykładach </text:span><text:span text:style-name="T10">😊</text:span></text:p>
      <text:p text:style-name="Zadanie">Wstaw zrzut ekranu zawierającego stronę ze wszystkimi elementami, tj. okno dynamicznej mapy, przycisk „Moja lokalizacja”, przycisk „Pobierz mapę”, przestrzeń z rozsypanymi puzzlami, przestrzeń do układania puzzli. Wygląd może być odmienny od zaprezentowanego na wideo:</text:p>
      <text:p text:style-name="Zadanie"><draw:frame draw:style-name="fr1" draw:name="Obraz1" text:anchor-type="char" svg:width="18.461cm" svg:height="15.055cm" draw:z-index="11"><draw:image xlink:href="Pictures/1000000100000619000004F9CAC5C726.png" xlink:type="simple" xlink:show="embed" xlink:actuate="onLoad" draw:mime-type="image/png"/></draw:frame><text:soft-page-break/></text:p>
      <text:p text:style-name="P9"/>
      <text:p text:style-name="Zadanie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">Punkty:</text:p>
          </table:table-cell>
          <table:table-cell table:style-name="Tabela2.A1" office:value-type="string">
            <text:p text:style-name="P11">0</text:p>
          </table:table-cell>
          <table:table-cell table:style-name="Tabela2.A1" office:value-type="string">
            <text:p text:style-name="P11">1</text:p>
          </table:table-cell>
        </table:table-row>
      </table:table>
      <text:p text:style-name="P12" loext:marker-style-name="T4"/>
      <text:p text:style-name="Zadanie"/>
      <text:p text:style-name="Zadanie">Wstaw zrzuty ekranu z:</text:p>
      <text:p text:style-name="Zadanie">załadowaną dynamiczną mapą:</text:p>
      <text:p text:style-name="Zadanie"/>
      <text:p text:style-name="P9"><draw:frame draw:style-name="fr2" draw:name="Obraz2" text:anchor-type="char" svg:width="15.612cm" svg:height="13.734cm" draw:z-index="0"><draw:image xlink:href="Pictures/100000010000024E00000207E868EA5E.png" xlink:type="simple" xlink:show="embed" xlink:actuate="onLoad" draw:mime-type="image/png"/></draw:frame><text:soft-page-break/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inną lokalizacją na mapie:</text:p>
      <text:p text:style-name="P9"><draw:frame draw:style-name="fr2" draw:name="Obraz3" text:anchor-type="char" svg:width="16.512cm" svg:height="14.078cm" draw:z-index="1"><draw:image xlink:href="Pictures/100000010000027000000214B1380C48.png" xlink:type="simple" xlink:show="embed" xlink:actuate="onLoad" draw:mime-type="image/png"/></draw:frame><text:soft-page-break/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innym przybliżeniem mapy:</text:p>
      <text:p text:style-name="P9"><text:soft-page-break/><draw:frame draw:style-name="fr3" draw:name="Obraz4" text:anchor-type="as-char" svg:width="15.956cm" svg:height="14.078cm" draw:z-index="2"><draw:image xlink:href="Pictures/100000010000025B000002147F93EEAB.png" xlink:type="simple" xlink:show="embed" xlink:actuate="onLoad" draw:mime-type="image/png"/></draw:frame></text:p>
      <text:p text:style-name="Zadanie"><text:s text:c="2"/></text:p>
      <text:p text:style-name="Zadanie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0">Punkty:</text:p>
          </table:table-cell>
          <table:table-cell table:style-name="Tabela3.A1" office:value-type="string">
            <text:p text:style-name="P11">0</text:p>
          </table:table-cell>
          <table:table-cell table:style-name="Tabela3.A1" office:value-type="string">
            <text:p text:style-name="P11">1</text:p>
          </table:table-cell>
        </table:table-row>
      </table:table>
      <text:p text:style-name="Standard"/>
      <text:p text:style-name="Zadanie">Przedstaw zrzut ekranu przeglądarki proszącej o zgodę na udostępnienie geolokalizacji:</text:p>
      <text:p text:style-name="P13"/>
      <text:p text:style-name="P9"><text:soft-page-break/><draw:frame draw:style-name="fr3" draw:name="Obraz5" text:anchor-type="as-char" svg:width="14.025cm" svg:height="7.548cm" draw:z-index="3"><draw:image xlink:href="Pictures/1000000100000212000001276E0E7B06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Wstaw zrzut ekranu wycentrowanej mapki na pobranej geolokalizacji:</text:p>
      <text:p text:style-name="Zadanie"/>
      <text:p text:style-name="P9"><text:soft-page-break/><draw:frame draw:style-name="fr3" draw:name="Obraz6" text:anchor-type="as-char" svg:width="15.665cm" svg:height="13.681cm" draw:z-index="4"><draw:image xlink:href="Pictures/1000000100000250000002051944D10E.png" xlink:type="simple" xlink:show="embed" xlink:actuate="onLoad" draw:mime-type="image/png"/></draw:frame></text:p>
      <text:p text:style-name="Zadanie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0">Punkty:</text:p>
          </table:table-cell>
          <table:table-cell table:style-name="Tabela4.A1" office:value-type="string">
            <text:p text:style-name="P11">0</text:p>
          </table:table-cell>
          <table:table-cell table:style-name="Tabela4.A1" office:value-type="string">
            <text:p text:style-name="P11">1</text:p>
          </table:table-cell>
        </table:table-row>
      </table:table>
      <text:p text:style-name="Standard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Wstaw zrzut ekranu obrazujący zapisanie ustawionego fragmentu mapy dynamicznej do rastra w canvas:</text:p>
      <text:p text:style-name="Zadanie"/>
      <text:p text:style-name="P9"><draw:frame draw:style-name="fr1" draw:name="Obraz7" text:anchor-type="char" svg:width="18.461cm" svg:height="7.904cm" draw:z-index="5"><draw:image xlink:href="Pictures/10000001000004D8000002138BB6B113.png" xlink:type="simple" xlink:show="embed" xlink:actuate="onLoad" draw:mime-type="image/png"/></draw:frame></text:p>
      <text:p text:style-name="Zadanie"/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 table:style-name="Tabela5.1">
          <table:table-cell table:style-name="Tabela5.A1" office:value-type="string">
            <text:p text:style-name="P10">Punkty:</text:p>
          </table:table-cell>
          <table:table-cell table:style-name="Tabela5.A1" office:value-type="string">
            <text:p text:style-name="P11">0</text:p>
          </table:table-cell>
          <table:table-cell table:style-name="Tabela5.A1" office:value-type="string">
            <text:p text:style-name="P11">1</text:p>
          </table:table-cell>
        </table:table-row>
      </table:table>
      <text:p text:style-name="Standard"/>
      <text:p text:style-name="Zadanie">Wstaw zrzut ekranu obrazujący podział mapy rastrowej na puzzle:</text:p>
      <text:p text:style-name="Zadanie"/>
      <text:p text:style-name="P9"><draw:frame draw:style-name="fr3" draw:name="Obraz8" text:anchor-type="as-char" svg:width="16.697cm" svg:height="13.839cm" draw:z-index="6"><draw:image xlink:href="Pictures/10000001000002770000020BD037D7F2.png" xlink:type="simple" xlink:show="embed" xlink:actuate="onLoad" draw:mime-type="image/png"/></draw:frame></text:p>
      <text:p text:style-name="Zadanie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0">Punkty:</text:p>
          </table:table-cell>
          <table:table-cell table:style-name="Tabela6.A1" office:value-type="string">
            <text:p text:style-name="P11">0</text:p>
          </table:table-cell>
          <table:table-cell table:style-name="Tabela6.A1" office:value-type="string">
            <text:p text:style-name="P11">1</text:p>
          </table:table-cell>
        </table:table-row>
      </table:table>
      <text:p text:style-name="Standard"/>
      <text:p text:style-name="Zadanie">Wstaw dwa zrzuty ekranu obrazujące działanie mechanizmu Drag-and-Drop na puzzlach:</text:p>
      <text:p text:style-name="Zadanie"/>
      <text:p text:style-name="P9"><text:soft-page-break/><draw:frame draw:style-name="fr4" draw:name="Obraz9" text:anchor-type="as-char" svg:width="18.461cm" svg:height="7.317cm" draw:z-index="7"><draw:image xlink:href="Pictures/10000001000005340000021064CF44B8.png" xlink:type="simple" xlink:show="embed" xlink:actuate="onLoad" draw:mime-type="image/png"/></draw:frame></text:p>
      <text:p text:style-name="Zadanie"/>
      <text:p text:style-name="P9"><draw:frame draw:style-name="fr4" draw:name="Obraz10" text:anchor-type="as-char" svg:width="18.461cm" svg:height="7.392cm" draw:z-index="8"><draw:image xlink:href="Pictures/10000001000005060000020378BCDDF0.png" xlink:type="simple" xlink:show="embed" xlink:actuate="onLoad" draw:mime-type="image/png"/></draw:frame></text:p>
      <text:p text:style-name="Zadani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0">Punkty:</text:p>
          </table:table-cell>
          <table:table-cell table:style-name="Tabela7.A1" office:value-type="string">
            <text:p text:style-name="P11">0</text:p>
          </table:table-cell>
          <table:table-cell table:style-name="Tabela7.A1" office:value-type="string">
            <text:p text:style-name="P11">1</text:p>
          </table:table-cell>
        </table:table-row>
      </table:table>
      <text:p text:style-name="Zadanie">Wstaw zrzut ekranu obrazujący działający mechanizm wykrywania poprawnego ułożenia wszystkich puzzli. Można ograniczyć się do wydrukowania komunikatu za pomocą <text:span text:style-name="inline-code">console.debug()</text:span>:</text:p>
      <text:p text:style-name="Zadanie"/>
      <text:p text:style-name="P9"><draw:frame draw:style-name="fr4" draw:name="Obraz11" text:anchor-type="as-char" svg:width="18.461cm" svg:height="4.232cm" draw:z-index="9"><draw:image xlink:href="Pictures/1000000100000465000001027047DF29.png" xlink:type="simple" xlink:show="embed" xlink:actuate="onLoad" draw:mime-type="image/png"/></draw:frame></text:p>
      <text:p text:style-name="Zadanie"/>
      <table:table table:name="Tabela8" table:style-name="Tabela8">
        <table:table-column table:style-name="Tabela8.A"/>
        <table:table-column table:style-name="Tabela8.B"/>
        <table:table-column table:style-name="Tabela8.C"/>
        <text:soft-page-break/>
        <table:table-row table:style-name="Tabela8.1">
          <table:table-cell table:style-name="Tabela8.A1" office:value-type="string">
            <text:p text:style-name="P10">Punkty:</text:p>
          </table:table-cell>
          <table:table-cell table:style-name="Tabela8.A1" office:value-type="string">
            <text:p text:style-name="P11">0</text:p>
          </table:table-cell>
          <table:table-cell table:style-name="Tabela8.A1" office:value-type="string">
            <text:p text:style-name="P11">1</text:p>
          </table:table-cell>
        </table:table-row>
      </table:table>
      <text:p text:style-name="Standard"/>
      <text:p text:style-name="Zadanie">Wstaw zrzut ekranu obrazujący wyświetlenie notyfikacji systemowej po poprawnym ułożeniu puzzli:</text:p>
      <text:p text:style-name="Zadanie"/>
      <text:p text:style-name="P9"><draw:frame draw:style-name="fr5" draw:name="Obraz12" text:anchor-type="char" svg:width="18.461cm" svg:height="7.442cm" draw:z-index="10"><draw:image xlink:href="Pictures/1000000100000D65000005662CEBA17A.png" xlink:type="simple" xlink:show="embed" xlink:actuate="onLoad" draw:mime-type="image/png"/></draw:frame></text:p>
      <text:p text:style-name="Zadanie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0">Punkty:</text:p>
          </table:table-cell>
          <table:table-cell table:style-name="Tabela9.A1" office:value-type="string">
            <text:p text:style-name="P11">0</text:p>
          </table:table-cell>
          <table:table-cell table:style-name="Tabela9.A1" office:value-type="string">
            <text:p text:style-name="P11">1</text:p>
          </table:table-cell>
        </table:table-row>
      </table:table>
      <text:h text:style-name="Heading_20_1" text:outline-level="1"><text:bookmark-start text:name="_Toc223385950"/>Commit projektu do GIT<text:bookmark-end text:name="_Toc223385950"/></text:h>
      <text:p text:style-name="Standard" loext:marker-style-name="T4"><text:span text:style-name="T4">Zacommituj i pushnij swoje rozwiązanie do repozytorium GIT.</text:span><text:span text:style-name="T4"/></text:p>
      <text:p text:style-name="Standard" loext:marker-style-name="T4"><text:span text:style-name="T4">Upewnij się, czy wszystko dobrze się wysłało. Upewnij się, że aktualna wersja rozwiązania jest dostępna przez GitHub Pages.</text:span><text:span text:style-name="T4"/></text:p>
      <text:p text:style-name="Zadanie"><text:bookmark-start text:name="_Toc223385951"/>Podaj link do swojego repozytorium:</text:p>
      <text:p text:style-name="Zadanie"/>
      <text:p text:style-name="Zadanie">https://vladyslavverhun.github.io/vv57707.github.io/<text:span text:style-name="T11">lab-c/</text:span></text:p>
      <text:h text:style-name="Heading_20_1" text:outline-level="1" loext:marker-style-name="T4"><text:span text:style-name="T4">Podsumowanie</text:span><text:bookmark-end text:name="_Toc223385951"/><text:span text:style-name="T4"/></text:h>
      <text:p text:style-name="Zadanie">W kilku słowach/zdaniach napisz swoje przemyślenia odnośnie tego laboratorium. Nie używaj LLM.</text:p>
      <text:p text:style-name="Zadanie"/>
      <text:p text:style-name="Zadanie">Laboratorium było ciekawe i praktyczne, ponieważ pozwoliło połączyć kilka elementów JavaScript w jednym projekcie. Podczas wykonywania zadania nauczyłem się korzystać z Geolocation API, biblioteki Leaflet, mechanizmu <text:soft-page-break/>Drag and Drop oraz powiadomień systemowych. Najwięcej uwagi wymagało poprawne zapisanie mapy do rastra i sprawdzenie działania układanki. Dzięki temu laboratorium lepiej zrozumiałem, jak połączyć różne funkcje przeglądarki w jednej aplikacji.</text:p>
      <text:p text:style-name="P12" loext:marker-style-name="T4"/>
      <text:p text:style-name="Standard" loext:marker-style-name="T4"><text:span text:style-name="T4">Zweryfikuj kompletność sprawozdania. Utwórz PDF i wyślij w terminie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top="0.423cm" fo:margin-bottom="0.423cm" style:contextual-spacing="tru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>
        <loext:char-complex-color loext:theme-type="light2" loext:color-type="theme">
          <loext:transformation loext:type="shade" loext:value="4980"/>
        </loext:char-complex-color>
      </style:text-properties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 loext:padding="0cm" loext:border="none" loext:shadow="none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language="pl" fo:country="P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user-defined style:data-style-name="N0" text:name="Kod kursu">PTW</text:user-defined></text:span><text:span text:style-name="MT1"><text:s/></text:span><text:span text:style-name="MT1"><text:user-defined style:data-style-name="N0" text:name="Kod laboratorium">LAB C</text:user-defined></text:span><text:span text:style-name="MT1"><text:s/>– </text:span><text:span text:style-name="MT1"><text:user-defined style:data-style-name="N0" text:name="Nazwisko">Verhun</text:user-defined></text:span><text:span text:style-name="MT1"><text:s/></text:span><text:span text:style-name="MT1"><text:user-defined style:data-style-name="N0" text:name="Imie">Vladyslav</text:user-defined></text:span><text:span text:style-name="MT1"><text:s/>– Wersja </text:span><text:span text:style-name="MT1"><text:user-defined style:data-style-name="N49" text:name="Wersja">2026-03-02</text:user-defined></text:span></text:p>
      </style:header>
      <style:header-first>
        <text:p text:style-name="Header"/>
      </style:header-first>
      <style:footer>
        <text:p text:style-name="MP1"><text:span text:style-name="MT1">Strona </text:span><text:span text:style-name="MT2"><text:page-number text:select-page="current">13</text:page-number></text:span><text:span text:style-name="MT1"><text:s/>z </text:span><text:span text:style-name="MT2"><text:page-count>13</text:page-count></text:span></text:p>
        <text:p text:style-name="Footer"/>
      </style:footer>
      <style:footer-first>
        <text:p text:style-name="MP1"><text:span text:style-name="MT1">Strona </text:span><text:span text:style-name="MT2"><text:page-number text:select-page="current">1</text:page-number></text:span><text:span text:style-name="MT1"><text:s/>z </text:span><text:span text:style-name="MT2"><text:page-count>13</text:page-count></text:span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rtur Karczmarczyk</meta:initial-creator>
    <meta:editing-cycles>200</meta:editing-cycles>
    <meta:creation-date>2023-09-21T13:44:00</meta:creation-date>
    <dc:date>2026-04-23T02:28:25.828083500</dc:date>
    <meta:editing-duration>PT4H35M27S</meta:editing-duration>
    <meta:generator>LibreOffice/25.8.5.2$Windows_X86_64 LibreOffice_project/9c8b85f387cc00a89945a79c9e6239f32e450ac2</meta:generator>
    <meta:document-statistic meta:table-count="9" meta:image-count="12" meta:object-count="0" meta:page-count="13" meta:paragraph-count="107" meta:word-count="625" meta:character-count="4656" meta:non-whitespace-character-count="4135"/>
    <meta:user-defined meta:name="AppVersion">16.0000</meta:user-defined>
    <meta:user-defined meta:name="ComplianceAssetId"/>
    <meta:user-defined meta:name="ContentTypeId">0x010100588AC5E40A1D7C44A0130CF6967E9E6C</meta:user-defined>
    <meta:user-defined meta:name="Grupa">251B</meta:user-defined>
    <meta:user-defined meta:name="Imie" meta:value-type="string">Vladyslav</meta:user-defined>
    <meta:user-defined meta:name="Kod kursu" meta:value-type="string">PTW</meta:user-defined>
    <meta:user-defined meta:name="Kod laboratorium" meta:value-type="string">LAB C</meta:user-defined>
    <meta:user-defined meta:name="Nazwisko" meta:value-type="string">Verhun</meta:user-defined>
    <meta:user-defined meta:name="Numer albumu" meta:value-type="string">57707</meta:user-defined>
    <meta:user-defined meta:name="Order" meta:value-type="float">1700</meta:user-defined>
    <meta:user-defined meta:name="TemplateUrl" meta:value-type="string"/>
    <meta:user-defined meta:name="TriggerFlowInfo" meta:value-type="string"/>
    <meta:user-defined meta:name="Wersja" meta:value-type="string">2026-03-02</meta:user-defined>
    <meta:user-defined meta:name="_ExtendedDescription" meta:value-type="string"/>
    <meta:user-defined meta:name="_SharedFileIndex" meta:value-type="string"/>
    <meta:user-defined meta:name="_SourceUrl" meta:value-type="string"/>
    <meta:user-defined meta:name="labdir" meta:value-type="string">I:\PTW\lab-c</meta:user-defined>
    <meta:user-defined meta:name="labsdir" meta:value-type="string">I:\PTW</meta:user-defined>
    <meta:user-defined meta:name="xd_ProgID" meta:value-type="string"/>
    <meta:user-defined meta:name="xd_Signature" meta:value-type="boolean">false</meta:user-defined>
    <meta:template xlink:type="simple" xlink:actuate="onRequest" xlink:title="Normal.dotm" xlink:href=""/>
  </office:meta>
</office:document-meta>
</file>